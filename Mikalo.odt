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7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8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20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1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2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3">
      <style:paragraph-properties fo:margin-top="0cm" fo:margin-bottom="0cm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4">
      <style:paragraph-properties fo:margin-top="0cm" fo:margin-bottom="0cm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5">
      <style:paragraph-properties fo:margin-top="0cm" fo:margin-bottom="0cm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6">
      <style:paragraph-properties fo:margin-top="0cm" fo:margin-bottom="0cm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7">
      <style:paragraph-properties fo:margin-top="0cm" fo:margin-bottom="0cm" style:contextual-spacing="false"/>
    </style:style>
    <style:style style:name="P53" style:family="paragraph" style:parent-style-name="Text_20_body" style:list-style-name="L27"/>
    <style:style style:name="P54" style:family="paragraph" style:parent-style-name="Text_20_body" style:list-style-name="L28">
      <style:paragraph-properties fo:margin-top="0cm" fo:margin-bottom="0cm" style:contextual-spacing="false"/>
    </style:style>
    <style:style style:name="P55" style:family="paragraph" style:parent-style-name="Text_20_body" style:list-style-name="L28"/>
    <style:style style:name="P56" style:family="paragraph" style:parent-style-name="Text_20_body" style:list-style-name="L29">
      <style:paragraph-properties fo:margin-top="0cm" fo:margin-bottom="0cm" style:contextual-spacing="false"/>
    </style:style>
    <style:style style:name="P57" style:family="paragraph" style:parent-style-name="Text_20_body" style:list-style-name="L29"/>
    <style:style style:name="P58" style:family="paragraph" style:parent-style-name="Text_20_body" style:list-style-name="L30">
      <style:paragraph-properties fo:margin-top="0cm" fo:margin-bottom="0cm" style:contextual-spacing="false"/>
    </style:style>
    <style:style style:name="P59" style:family="paragraph" style:parent-style-name="Text_20_body" style:list-style-name="L30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1"/>
    <style:style style:name="P62" style:family="paragraph" style:parent-style-name="Text_20_body" style:list-style-name="L32">
      <style:paragraph-properties fo:margin-top="0cm" fo:margin-bottom="0cm" style:contextual-spacing="false"/>
    </style:style>
    <style:style style:name="P63" style:family="paragraph" style:parent-style-name="Text_20_body" style:list-style-name="L32"/>
    <style:style style:name="P64" style:family="paragraph" style:parent-style-name="Text_20_body" style:list-style-name="L33">
      <style:paragraph-properties fo:margin-top="0cm" fo:margin-bottom="0cm" style:contextual-spacing="false"/>
    </style:style>
    <style:style style:name="P65" style:family="paragraph" style:parent-style-name="Text_20_body" style:list-style-name="L33"/>
    <style:style style:name="P66" style:family="paragraph" style:parent-style-name="Text_20_body" style:list-style-name="L34">
      <style:paragraph-properties fo:margin-top="0cm" fo:margin-bottom="0cm" style:contextual-spacing="false"/>
    </style:style>
    <style:style style:name="P67" style:family="paragraph" style:parent-style-name="Text_20_body" style:list-style-name="L34"/>
    <style:style style:name="P68" style:family="paragraph" style:parent-style-name="Text_20_body" style:list-style-name="L35">
      <style:paragraph-properties fo:margin-top="0cm" fo:margin-bottom="0cm" style:contextual-spacing="false"/>
    </style:style>
    <style:style style:name="P69" style:family="paragraph" style:parent-style-name="Text_20_body" style:list-style-name="L35"/>
    <style:style style:name="P70" style:family="paragraph" style:parent-style-name="Text_20_body" style:list-style-name="L36">
      <style:paragraph-properties fo:margin-top="0cm" fo:margin-bottom="0cm" style:contextual-spacing="false"/>
    </style:style>
    <style:style style:name="P71" style:family="paragraph" style:parent-style-name="Text_20_body" style:list-style-name="L36"/>
    <style:style style:name="P72" style:family="paragraph" style:parent-style-name="Text_20_body" style:list-style-name="L37">
      <style:paragraph-properties fo:margin-top="0cm" fo:margin-bottom="0cm" style:contextual-spacing="false"/>
    </style:style>
    <style:style style:name="P73" style:family="paragraph" style:parent-style-name="Text_20_body" style:list-style-name="L37"/>
    <style:style style:name="P74" style:family="paragraph" style:parent-style-name="Text_20_body" style:list-style-name="L38">
      <style:paragraph-properties fo:margin-top="0cm" fo:margin-bottom="0cm" style:contextual-spacing="false"/>
    </style:style>
    <style:style style:name="P75" style:family="paragraph" style:parent-style-name="Text_20_body" style:list-style-name="L38"/>
    <style:style style:name="P76" style:family="paragraph" style:parent-style-name="Text_20_body" style:list-style-name="L39">
      <style:paragraph-properties fo:margin-top="0cm" fo:margin-bottom="0cm" style:contextual-spacing="false"/>
    </style:style>
    <style:style style:name="P77" style:family="paragraph" style:parent-style-name="Text_20_body" style:list-style-name="L39"/>
    <style:style style:name="P78" style:family="paragraph" style:parent-style-name="Text_20_body" style:list-style-name="L40">
      <style:paragraph-properties fo:margin-top="0cm" fo:margin-bottom="0cm" style:contextual-spacing="false"/>
    </style:style>
    <style:style style:name="P79" style:family="paragraph" style:parent-style-name="Text_20_body" style:list-style-name="L40"/>
    <style:style style:name="P80" style:family="paragraph" style:parent-style-name="Text_20_body" style:list-style-name="L41">
      <style:paragraph-properties fo:margin-top="0cm" fo:margin-bottom="0cm" style:contextual-spacing="false"/>
    </style:style>
    <style:style style:name="P81" style:family="paragraph" style:parent-style-name="Text_20_body" style:list-style-name="L41"/>
    <style:style style:name="P82" style:family="paragraph" style:parent-style-name="Text_20_body" style:list-style-name="L42">
      <style:paragraph-properties fo:margin-top="0cm" fo:margin-bottom="0cm" style:contextual-spacing="false"/>
    </style:style>
    <style:style style:name="P83" style:family="paragraph" style:parent-style-name="Text_20_body" style:list-style-name="L42"/>
    <style:style style:name="P84" style:family="paragraph" style:parent-style-name="Text_20_body" style:list-style-name="L43"/>
    <style:style style:name="P85" style:family="paragraph" style:parent-style-name="Text_20_body" style:list-style-name="L44"/>
    <style:style style:name="P86" style:family="paragraph" style:parent-style-name="Text_20_body" style:list-style-name="L45"/>
    <style:style style:name="P87" style:family="paragraph" style:parent-style-name="Text_20_body" style:list-style-name="L46"/>
    <style:style style:name="P88" style:family="paragraph" style:parent-style-name="Text_20_body" style:list-style-name="L47"/>
    <style:style style:name="P89" style:family="paragraph" style:parent-style-name="Text_20_body" style:list-style-name="L48">
      <style:paragraph-properties fo:margin-top="0cm" fo:margin-bottom="0cm" style:contextual-spacing="false"/>
    </style:style>
    <style:style style:name="P90" style:family="paragraph" style:parent-style-name="Text_20_body" style:list-style-name="L48"/>
    <style:style style:name="P91" style:family="paragraph" style:parent-style-name="Text_20_body" style:list-style-name="L49"/>
    <style:style style:name="P92" style:family="paragraph" style:parent-style-name="Text_20_body" style:list-style-name="L50"/>
    <style:style style:name="P93" style:family="paragraph" style:parent-style-name="Text_20_body" style:list-style-name="L51">
      <style:paragraph-properties fo:margin-top="0cm" fo:margin-bottom="0cm" style:contextual-spacing="false"/>
    </style:style>
    <style:style style:name="P94" style:family="paragraph" style:parent-style-name="Text_20_body" style:list-style-name="L51"/>
    <style:style style:name="P95" style:family="paragraph" style:parent-style-name="Text_20_body" style:list-style-name="L52">
      <style:paragraph-properties fo:margin-top="0cm" fo:margin-bottom="0cm" style:contextual-spacing="false"/>
    </style:style>
    <style:style style:name="P96" style:family="paragraph" style:parent-style-name="Text_20_body" style:list-style-name="L52"/>
    <style:style style:name="P97" style:family="paragraph" style:parent-style-name="Text_20_body" style:list-style-name="L53">
      <style:paragraph-properties fo:margin-top="0cm" fo:margin-bottom="0cm" style:contextual-spacing="false"/>
    </style:style>
    <style:style style:name="P98" style:family="paragraph" style:parent-style-name="Text_20_body" style:list-style-name="L53"/>
    <style:style style:name="P99" style:family="paragraph" style:parent-style-name="Text_20_body" style:list-style-name="L54">
      <style:paragraph-properties fo:margin-top="0cm" fo:margin-bottom="0cm" style:contextual-spacing="false"/>
    </style:style>
    <style:style style:name="P100" style:family="paragraph" style:parent-style-name="Text_20_body" style:list-style-name="L54"/>
    <style:style style:name="T1" style:family="text">
      <style:text-properties officeooo:rsid="0008b47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HIER DES CHARGES COMPLET</text:h>
      <text:h text:style-name="Heading_20_1" text:outline-level="1">MIKALO TOUR</text:h>
      <text:h text:style-name="Heading_20_3" text:outline-level="3">Plateforme intelligente de mise en relation entre touristes, guides et agences de voyage</text:h>
      <text:p text:style-name="Text_20_body"><text:span text:style-name="Strong_20_Emphasis">Version : 2.0</text:span><text:line-break/><text:span text:style-name="Strong_20_Emphasis">Auteur : Eric Dev</text:span><text:line-break/><text:span text:style-name="Strong_20_Emphasis">Date : Juin 2026</text:span></text:p>
      <text:p text:style-name="Horizontal_20_Line"/>
      <text:h text:style-name="Heading_20_1" text:outline-level="1">1. PRÉSENTATION GÉNÉRALE</text:h>
      <text:h text:style-name="Heading_20_2" text:outline-level="2">1.1 Nom du projet</text:h>
      <text:p text:style-name="Text_20_body"><text:span text:style-name="Strong_20_Emphasis">Mikalo Tour</text:span></text:p>
      <text:h text:style-name="Heading_20_2" text:outline-level="2">1.2 Slogan</text:h>
      <text:p text:style-name="Text_20_body"><text:span text:style-name="Strong_20_Emphasis">"Connecter les voyageurs aux meilleurs guides et agences de Madagascar."</text:span></text:p>
      <text:h text:style-name="Heading_20_2" text:outline-level="2">1.3 Description du projet</text:h>
      <text:p text:style-name="Text_20_body">Mikalo Tour est une plateforme numérique (Web + Mobile) qui centralise l'ensemble de l'écosystème touristique malgache :</text:p>
      <text:list text:style-name="L1">
        <text:list-item>
          <text:p text:style-name="P1">Touristes nationaux et internationaux </text:p>
        </text:list-item>
        <text:list-item>
          <text:p text:style-name="P1">Guides touristiques certifiés </text:p>
        </text:list-item>
        <text:list-item>
          <text:p text:style-name="P1">Agences de voyage </text:p>
        </text:list-item>
        <text:list-item>
          <text:p text:style-name="P1">Chauffeurs touristiques </text:p>
        </text:list-item>
        <text:list-item>
          <text:p text:style-name="P1">Hôtels et hébergements </text:p>
        </text:list-item>
        <text:list-item>
          <text:p text:style-name="P2">Organisateurs d'activités </text:p>
        </text:list-item>
      </text:list>
      <text:p text:style-name="Text_20_body">La plateforme facilite la découverte, la réservation, la communication et la gestion des voyages grâce à l'intelligence artificielle.</text:p>
      <text:p text:style-name="Horizontal_20_Line"/>
      <text:h text:style-name="Heading_20_1" text:outline-level="1">2. PROBLÉMATIQUE</text:h>
      <text:h text:style-name="Heading_20_2" text:outline-level="2">Pour les touristes</text:h>
      <text:list text:style-name="L2">
        <text:list-item>
          <text:p text:style-name="P3">Difficulté à trouver des guides fiables. </text:p>
        </text:list-item>
        <text:list-item>
          <text:p text:style-name="P3">Difficulté à comparer les agences. </text:p>
        </text:list-item>
        <text:list-item>
          <text:p text:style-name="P3"><text:soft-page-break/>Manque d'informations centralisées. </text:p>
        </text:list-item>
        <text:list-item>
          <text:p text:style-name="P3">Organisation complexe du voyage. </text:p>
        </text:list-item>
        <text:list-item>
          <text:p text:style-name="P4">Barrière linguistique. </text:p>
        </text:list-item>
      </text:list>
      <text:h text:style-name="Heading_20_2" text:outline-level="2">Pour les guides</text:h>
      <text:list text:style-name="L3">
        <text:list-item>
          <text:p text:style-name="P5">Faible visibilité. </text:p>
        </text:list-item>
        <text:list-item>
          <text:p text:style-name="P5">Difficulté à trouver des clients. </text:p>
        </text:list-item>
        <text:list-item>
          <text:p text:style-name="P6">Absence d'outils numériques professionnels. </text:p>
        </text:list-item>
      </text:list>
      <text:h text:style-name="Heading_20_2" text:outline-level="2">Pour les agences</text:h>
      <text:list text:style-name="L4">
        <text:list-item>
          <text:p text:style-name="P7">Acquisition de clients coûteuse. </text:p>
        </text:list-item>
        <text:list-item>
          <text:p text:style-name="P7">Manque de visibilité internationale. </text:p>
        </text:list-item>
        <text:list-item>
          <text:p text:style-name="P8">Gestion dispersée des réservations. </text:p>
        </text:list-item>
      </text:list>
      <text:p text:style-name="Horizontal_20_Line"/>
      <text:h text:style-name="Heading_20_1" text:outline-level="1">3. OBJECTIFS</text:h>
      <text:p text:style-name="Text_20_body">Créer une plateforme permettant :</text:p>
      <text:list text:style-name="L5">
        <text:list-item>
          <text:p text:style-name="P9">La mise en relation entre touristes, guides et agences. </text:p>
        </text:list-item>
        <text:list-item>
          <text:p text:style-name="P9">La réservation sécurisée de services touristiques. </text:p>
        </text:list-item>
        <text:list-item>
          <text:p text:style-name="P9">La planification intelligente de voyages. </text:p>
        </text:list-item>
        <text:list-item>
          <text:p text:style-name="P9">La promotion du tourisme malgache. </text:p>
        </text:list-item>
        <text:list-item>
          <text:p text:style-name="P10">La digitalisation des agences locales. </text:p>
        </text:list-item>
      </text:list>
      <text:p text:style-name="Horizontal_20_Line"/>
      <text:h text:style-name="Heading_20_1" text:outline-level="1">4. UTILISATEURS</text:h>
      <text:h text:style-name="Heading_20_2" text:outline-level="2">Touristes</text:h>
      <text:list text:style-name="L6">
        <text:list-item>
          <text:p text:style-name="P11">Voyageurs locaux </text:p>
        </text:list-item>
        <text:list-item>
          <text:p text:style-name="P12">Voyageurs internationaux </text:p>
        </text:list-item>
      </text:list>
      <text:h text:style-name="Heading_20_2" text:outline-level="2">Guides touristiques</text:h>
      <text:list text:style-name="L7">
        <text:list-item>
          <text:p text:style-name="P13">Guides indépendants </text:p>
        </text:list-item>
        <text:list-item>
          <text:p text:style-name="P14">Guides certifiés </text:p>
        </text:list-item>
      </text:list>
      <text:h text:style-name="Heading_20_2" text:outline-level="2">Agences de voyage</text:h>
      <text:list text:style-name="L8">
        <text:list-item>
          <text:p text:style-name="P15">Tours opérateurs </text:p>
        </text:list-item>
        <text:list-item>
          <text:p text:style-name="P15">Agences locales </text:p>
        </text:list-item>
        <text:list-item>
          <text:p text:style-name="P16">Agences internationales partenaires </text:p>
        </text:list-item>
      </text:list>
      <text:h text:style-name="Heading_20_2" text:outline-level="2"><text:soft-page-break/>Administrateurs</text:h>
      <text:list text:style-name="L9">
        <text:list-item>
          <text:p text:style-name="P17">Équipe Mikalo Tour </text:p>
        </text:list-item>
      </text:list>
      <text:p text:style-name="Horizontal_20_Line"/>
      <text:h text:style-name="Heading_20_1" text:outline-level="1">5. FONCTIONNALITÉS</text:h>
      <text:h text:style-name="Heading_20_1" text:outline-level="1">MODULE 1 : AUTHENTIFICATION</text:h>
      <text:h text:style-name="Heading_20_3" text:outline-level="3">Inscription</text:h>
      <text:list text:style-name="L10">
        <text:list-item>
          <text:p text:style-name="P18">Email </text:p>
        </text:list-item>
        <text:list-item>
          <text:p text:style-name="P18">Google </text:p>
        </text:list-item>
        <text:list-item>
          <text:p text:style-name="P18">Apple </text:p>
        </text:list-item>
        <text:list-item>
          <text:p text:style-name="P19">Facebook </text:p>
        </text:list-item>
      </text:list>
      <text:h text:style-name="Heading_20_3" text:outline-level="3">Gestion du profil</text:h>
      <text:list text:style-name="L11">
        <text:list-item>
          <text:p text:style-name="P20">Informations personnelles </text:p>
        </text:list-item>
        <text:list-item>
          <text:p text:style-name="P20">Langues parlées </text:p>
        </text:list-item>
        <text:list-item>
          <text:p text:style-name="P20">Photo </text:p>
        </text:list-item>
        <text:list-item>
          <text:p text:style-name="P21">Préférences de voyage </text:p>
        </text:list-item>
      </text:list>
      <text:p text:style-name="Horizontal_20_Line"/>
      <text:h text:style-name="Heading_20_1" text:outline-level="1">MODULE 2 : PROFIL GUIDE</text:h>
      <text:h text:style-name="Heading_20_3" text:outline-level="3">Informations</text:h>
      <text:list text:style-name="L12">
        <text:list-item>
          <text:p text:style-name="P22">Nom complet </text:p>
        </text:list-item>
        <text:list-item>
          <text:p text:style-name="P22">Photo professionnelle </text:p>
        </text:list-item>
        <text:list-item>
          <text:p text:style-name="P22">Biographie </text:p>
        </text:list-item>
        <text:list-item>
          <text:p text:style-name="P22">Certifications </text:p>
        </text:list-item>
        <text:list-item>
          <text:p text:style-name="P22">Expériences </text:p>
        </text:list-item>
        <text:list-item>
          <text:p text:style-name="P23">Langues </text:p>
        </text:list-item>
      </text:list>
      <text:h text:style-name="Heading_20_3" text:outline-level="3">Disponibilités</text:h>
      <text:list text:style-name="L13">
        <text:list-item>
          <text:p text:style-name="P24">Calendrier </text:p>
        </text:list-item>
        <text:list-item>
          <text:p text:style-name="P25">Zones d'intervention </text:p>
        </text:list-item>
      </text:list>
      <text:h text:style-name="Heading_20_3" text:outline-level="3">Vérification</text:h>
      <text:list text:style-name="L14">
        <text:list-item>
          <text:p text:style-name="P26">Pièce d'identité </text:p>
        </text:list-item>
        <text:list-item>
          <text:p text:style-name="P27">Certificat professionnel </text:p>
        </text:list-item>
      </text:list>
      <text:p text:style-name="Text_20_body">Badge :</text:p>
      <text:p text:style-name="Text_20_body"><text:soft-page-break/>✅ Guide Certifié</text:p>
      <text:p text:style-name="Horizontal_20_Line"/>
      <text:h text:style-name="Heading_20_1" text:outline-level="1">MODULE 3 : PROFIL AGENCE</text:h>
      <text:h text:style-name="Heading_20_3" text:outline-level="3">Création d'agence</text:h>
      <text:list text:style-name="L15">
        <text:list-item>
          <text:p text:style-name="P28">Nom de l'agence </text:p>
        </text:list-item>
        <text:list-item>
          <text:p text:style-name="P28">Logo </text:p>
        </text:list-item>
        <text:list-item>
          <text:p text:style-name="P28">Adresse </text:p>
        </text:list-item>
        <text:list-item>
          <text:p text:style-name="P28">Numéro d'agrément </text:p>
        </text:list-item>
        <text:list-item>
          <text:p text:style-name="P28">Site web </text:p>
        </text:list-item>
        <text:list-item>
          <text:p text:style-name="P29">Contacts </text:p>
        </text:list-item>
      </text:list>
      <text:h text:style-name="Heading_20_3" text:outline-level="3">Présentation</text:h>
      <text:list text:style-name="L16">
        <text:list-item>
          <text:p text:style-name="P30">Description </text:p>
        </text:list-item>
        <text:list-item>
          <text:p text:style-name="P30">Services proposés </text:p>
        </text:list-item>
        <text:list-item>
          <text:p text:style-name="P31">Régions couvertes </text:p>
        </text:list-item>
      </text:list>
      <text:h text:style-name="Heading_20_3" text:outline-level="3">Vérification</text:h>
      <text:list text:style-name="L17">
        <text:list-item>
          <text:p text:style-name="P32">Registre de commerce </text:p>
        </text:list-item>
        <text:list-item>
          <text:p text:style-name="P33">Autorisation d'exploitation </text:p>
        </text:list-item>
      </text:list>
      <text:p text:style-name="Text_20_body">Badge :</text:p>
      <text:p text:style-name="Text_20_body">🏢 Agence Vérifiée</text:p>
      <text:p text:style-name="Horizontal_20_Line"/>
      <text:h text:style-name="Heading_20_1" text:outline-level="1">MODULE 4 : IA DE PLANIFICATION</text:h>
      <text:p text:style-name="Text_20_body">Le voyageur décrit son projet :</text:p>
      <text:p text:style-name="Quotations">"Je viens de France, j'ai 10 jours, un budget de 2000€, j'aime les plages et les parcs naturels."</text:p>
      <text:p text:style-name="Text_20_body">L'IA génère :</text:p>
      <text:list text:style-name="L18">
        <text:list-item>
          <text:p text:style-name="P34">Itinéraire complet </text:p>
        </text:list-item>
        <text:list-item>
          <text:p text:style-name="P34">Budget détaillé </text:p>
        </text:list-item>
        <text:list-item>
          <text:p text:style-name="P34">Guides recommandés </text:p>
        </text:list-item>
        <text:list-item>
          <text:p text:style-name="P34">Agences adaptées </text:p>
        </text:list-item>
        <text:list-item>
          <text:p text:style-name="P34">Hôtels </text:p>
        </text:list-item>
        <text:list-item>
          <text:p text:style-name="P35">Moyens de transport </text:p>
        </text:list-item>
      </text:list>
      <text:p text:style-name="Horizontal_20_Line"/>
      <text:h text:style-name="Heading_20_1" text:outline-level="1"><text:soft-page-break/>MODULE 5 : RECHERCHE INTELLIGENTE</text:h>
      <text:p text:style-name="Text_20_body">Recherche par :</text:p>
      <text:list text:style-name="L19">
        <text:list-item>
          <text:p text:style-name="P36">Région </text:p>
        </text:list-item>
        <text:list-item>
          <text:p text:style-name="P36">Ville </text:p>
        </text:list-item>
        <text:list-item>
          <text:p text:style-name="P36">Budget </text:p>
        </text:list-item>
        <text:list-item>
          <text:p text:style-name="P36">Langue </text:p>
        </text:list-item>
        <text:list-item>
          <text:p text:style-name="P36">Activité </text:p>
        </text:list-item>
        <text:list-item>
          <text:p text:style-name="P36">Guide </text:p>
        </text:list-item>
        <text:list-item>
          <text:p text:style-name="P37">Agence </text:p>
        </text:list-item>
      </text:list>
      <text:p text:style-name="Text_20_body">Filtres avancés :</text:p>
      <text:list text:style-name="L20">
        <text:list-item>
          <text:p text:style-name="P38">Note minimale </text:p>
        </text:list-item>
        <text:list-item>
          <text:p text:style-name="P38">Disponibilité </text:p>
        </text:list-item>
        <text:list-item>
          <text:p text:style-name="P39">Certification </text:p>
        </text:list-item>
      </text:list>
      <text:p text:style-name="Horizontal_20_Line"/>
      <text:h text:style-name="Heading_20_1" text:outline-level="1">MODULE 6 : RÉSERVATION</text:h>
      <text:h text:style-name="Heading_20_2" text:outline-level="2">Réservation d'un guide</text:h>
      <text:list text:style-name="L21">
        <text:list-item>
          <text:p text:style-name="P40">À l'heure </text:p>
        </text:list-item>
        <text:list-item>
          <text:p text:style-name="P40">À la journée </text:p>
        </text:list-item>
        <text:list-item>
          <text:p text:style-name="P41">Circuit complet </text:p>
        </text:list-item>
      </text:list>
      <text:h text:style-name="Heading_20_2" text:outline-level="2">Réservation d'une agence</text:h>
      <text:list text:style-name="L22">
        <text:list-item>
          <text:p text:style-name="P42">Packs touristiques </text:p>
        </text:list-item>
        <text:list-item>
          <text:p text:style-name="P42">Voyages organisés </text:p>
        </text:list-item>
        <text:list-item>
          <text:p text:style-name="P43">Excursions </text:p>
        </text:list-item>
      </text:list>
      <text:h text:style-name="Heading_20_2" text:outline-level="2">Réservation combinée</text:h>
      <text:p text:style-name="Text_20_body">Exemple :</text:p>
      <text:p text:style-name="Text_20_body">Touriste + Guide + Agence + Hôtel</text:p>
      <text:p text:style-name="Horizontal_20_Line"/>
      <text:h text:style-name="Heading_20_1" text:outline-level="1">MODULE 7 : MARKETPLACE TOURISTIQUE</text:h>
      <text:p text:style-name="Text_20_body">Les agences et guides peuvent publier :</text:p>
      <text:h text:style-name="Heading_20_3" text:outline-level="3"><text:soft-page-break/>Circuits</text:h>
      <text:list text:style-name="L23">
        <text:list-item>
          <text:p text:style-name="P44">Nord de Madagascar </text:p>
        </text:list-item>
        <text:list-item>
          <text:p text:style-name="P44">Nosy Be </text:p>
        </text:list-item>
        <text:list-item>
          <text:p text:style-name="P44">Tsingy </text:p>
        </text:list-item>
        <text:list-item>
          <text:p text:style-name="P45">Sainte-Marie </text:p>
        </text:list-item>
      </text:list>
      <text:h text:style-name="Heading_20_3" text:outline-level="3">Activités</text:h>
      <text:list text:style-name="L24">
        <text:list-item>
          <text:p text:style-name="P46">Randonnées </text:p>
        </text:list-item>
        <text:list-item>
          <text:p text:style-name="P46">Plongée </text:p>
        </text:list-item>
        <text:list-item>
          <text:p text:style-name="P46">Safari </text:p>
        </text:list-item>
        <text:list-item>
          <text:p text:style-name="P47">Découverte culturelle </text:p>
        </text:list-item>
      </text:list>
      <text:p text:style-name="Horizontal_20_Line"/>
      <text:h text:style-name="Heading_20_1" text:outline-level="1">MODULE 8 : COMMUNICATION</text:h>
      <text:p text:style-name="Text_20_body">Messagerie intégrée :</text:p>
      <text:list text:style-name="L25">
        <text:list-item>
          <text:p text:style-name="P48">Texte </text:p>
        </text:list-item>
        <text:list-item>
          <text:p text:style-name="P48">Images </text:p>
        </text:list-item>
        <text:list-item>
          <text:p text:style-name="P48">Documents </text:p>
        </text:list-item>
        <text:list-item>
          <text:p text:style-name="P48">Appels audio </text:p>
        </text:list-item>
        <text:list-item>
          <text:p text:style-name="P49">Appels vidéo </text:p>
        </text:list-item>
      </text:list>
      <text:p text:style-name="Horizontal_20_Line"/>
      <text:h text:style-name="Heading_20_1" text:outline-level="1">MODULE 9 : TRADUCTION IA</text:h>
      <text:p text:style-name="Text_20_body">Traduction automatique :</text:p>
      <text:list text:style-name="L26">
        <text:list-item>
          <text:p text:style-name="P50">Malagasy </text:p>
        </text:list-item>
        <text:list-item>
          <text:p text:style-name="P50">Français </text:p>
        </text:list-item>
        <text:list-item>
          <text:p text:style-name="P50">Anglais </text:p>
        </text:list-item>
        <text:list-item>
          <text:p text:style-name="P50">Espagnol </text:p>
        </text:list-item>
        <text:list-item>
          <text:p text:style-name="P50">Italien </text:p>
        </text:list-item>
        <text:list-item>
          <text:p text:style-name="P50">Allemand </text:p>
        </text:list-item>
        <text:list-item>
          <text:p text:style-name="P51">Chinois </text:p>
        </text:list-item>
      </text:list>
      <text:p text:style-name="Text_20_body">Exemple :</text:p>
      <text:p text:style-name="Text_20_body">Un guide malgache écrit en malagasy.</text:p>
      <text:p text:style-name="Text_20_body">Le touriste reçoit automatiquement le message en français.</text:p>
      <text:p text:style-name="Horizontal_20_Line"/>
      <text:h text:style-name="Heading_20_1" text:outline-level="1"><text:soft-page-break/>MODULE 10 : RÉSEAU SOCIAL TOURISTIQUE</text:h>
      <text:h text:style-name="Heading_20_3" text:outline-level="3">Publications</text:h>
      <text:list text:style-name="L27">
        <text:list-item>
          <text:p text:style-name="P52">Photos </text:p>
        </text:list-item>
        <text:list-item>
          <text:p text:style-name="P52">Vidéos </text:p>
        </text:list-item>
        <text:list-item>
          <text:p text:style-name="P53">Stories </text:p>
        </text:list-item>
      </text:list>
      <text:h text:style-name="Heading_20_3" text:outline-level="3">Interactions</text:h>
      <text:list text:style-name="L28">
        <text:list-item>
          <text:p text:style-name="P54">Likes </text:p>
        </text:list-item>
        <text:list-item>
          <text:p text:style-name="P54">Commentaires </text:p>
        </text:list-item>
        <text:list-item>
          <text:p text:style-name="P55">Partages </text:p>
        </text:list-item>
      </text:list>
      <text:h text:style-name="Heading_20_3" text:outline-level="3">Fonctionnalités</text:h>
      <text:list text:style-name="L29">
        <text:list-item>
          <text:p text:style-name="P56">Suivre des guides </text:p>
        </text:list-item>
        <text:list-item>
          <text:p text:style-name="P56">Suivre des agences </text:p>
        </text:list-item>
        <text:list-item>
          <text:p text:style-name="P57">Suivre des voyageurs </text:p>
        </text:list-item>
      </text:list>
      <text:p text:style-name="Horizontal_20_Line"/>
      <text:h text:style-name="Heading_20_1" text:outline-level="1">MODULE 11 : QR CODE PROFESSIONNEL</text:h>
      <text:p text:style-name="Text_20_body">Chaque guide et agence possède :</text:p>
      <text:h text:style-name="Heading_20_3" text:outline-level="3">QR Code Unique</text:h>
      <text:p text:style-name="Text_20_body">Contenant :</text:p>
      <text:list text:style-name="L30">
        <text:list-item>
          <text:p text:style-name="P58">Profil public </text:p>
        </text:list-item>
        <text:list-item>
          <text:p text:style-name="P58">Avis </text:p>
        </text:list-item>
        <text:list-item>
          <text:p text:style-name="P58">Services </text:p>
        </text:list-item>
        <text:list-item>
          <text:p text:style-name="P59">Réservation directe </text:p>
        </text:list-item>
      </text:list>
      <text:p text:style-name="Text_20_body">Utilisations :</text:p>
      <text:list text:style-name="L31">
        <text:list-item>
          <text:p text:style-name="P60">Carte de visite </text:p>
        </text:list-item>
        <text:list-item>
          <text:p text:style-name="P60">Affiche </text:p>
        </text:list-item>
        <text:list-item>
          <text:p text:style-name="P61">Badge professionnel </text:p>
        </text:list-item>
      </text:list>
      <text:p text:style-name="Horizontal_20_Line"/>
      <text:h text:style-name="Heading_20_1" text:outline-level="1">MODULE 12 : SYSTÈME D'AVIS</text:h>
      <text:p text:style-name="Text_20_body">Notation :</text:p>
      <text:p text:style-name="Text_20_body">⭐ 1 à 5 étoiles</text:p>
      <text:p text:style-name="Text_20_body">Évaluation de :</text:p>
      <text:list text:style-name="L32">
        <text:list-item>
          <text:p text:style-name="P62"><text:soft-page-break/>Guide </text:p>
        </text:list-item>
        <text:list-item>
          <text:p text:style-name="P62">Agence </text:p>
        </text:list-item>
        <text:list-item>
          <text:p text:style-name="P62">Activité </text:p>
        </text:list-item>
        <text:list-item>
          <text:p text:style-name="P63">Circuit </text:p>
        </text:list-item>
      </text:list>
      <text:p text:style-name="Horizontal_20_Line"/>
      <text:h text:style-name="Heading_20_1" text:outline-level="1">MODULE 13 : TABLEAU DE BORD GUIDE</text:h>
      <text:p text:style-name="Text_20_body">Le guide peut :</text:p>
      <text:list text:style-name="L33">
        <text:list-item>
          <text:p text:style-name="P64">Voir ses réservations </text:p>
        </text:list-item>
        <text:list-item>
          <text:p text:style-name="P64">Gérer son agenda </text:p>
        </text:list-item>
        <text:list-item>
          <text:p text:style-name="P64">Consulter ses revenus </text:p>
        </text:list-item>
        <text:list-item>
          <text:p text:style-name="P65">Répondre aux avis </text:p>
        </text:list-item>
      </text:list>
      <text:p text:style-name="Horizontal_20_Line"/>
      <text:h text:style-name="Heading_20_1" text:outline-level="1">MODULE 14 : TABLEAU DE BORD AGENCE</text:h>
      <text:p text:style-name="Text_20_body">L'agence peut :</text:p>
      <text:list text:style-name="L34">
        <text:list-item>
          <text:p text:style-name="P66">Créer des offres </text:p>
        </text:list-item>
        <text:list-item>
          <text:p text:style-name="P66">Gérer les réservations </text:p>
        </text:list-item>
        <text:list-item>
          <text:p text:style-name="P66">Gérer les guides partenaires </text:p>
        </text:list-item>
        <text:list-item>
          <text:p text:style-name="P66">Consulter ses statistiques </text:p>
        </text:list-item>
        <text:list-item>
          <text:p text:style-name="P67">Créer des promotions </text:p>
        </text:list-item>
      </text:list>
      <text:p text:style-name="Horizontal_20_Line"/>
      <text:h text:style-name="Heading_20_1" text:outline-level="1">MODULE 15 : PARTENARIAT AGENCE ↔ GUIDE</text:h>
      <text:p text:style-name="Text_20_body">Fonction innovante :</text:p>
      <text:p text:style-name="Text_20_body">Une agence peut :</text:p>
      <text:list text:style-name="L35">
        <text:list-item>
          <text:p text:style-name="P68">Recruter des guides partenaires </text:p>
        </text:list-item>
        <text:list-item>
          <text:p text:style-name="P68">Constituer un réseau de guides </text:p>
        </text:list-item>
        <text:list-item>
          <text:p text:style-name="P69">Affecter un guide à un circuit </text:p>
        </text:list-item>
      </text:list>
      <text:p text:style-name="Text_20_body">Un guide peut :</text:p>
      <text:list text:style-name="L36">
        <text:list-item>
          <text:p text:style-name="P70">Travailler avec plusieurs agences </text:p>
        </text:list-item>
        <text:list-item>
          <text:p text:style-name="P70">Recevoir des missions </text:p>
        </text:list-item>
        <text:list-item>
          <text:p text:style-name="P71">Accepter ou refuser une affectation </text:p>
        </text:list-item>
      </text:list>
      <text:p text:style-name="Horizontal_20_Line"/>
      <text:h text:style-name="Heading_20_1" text:outline-level="1"><text:soft-page-break/>MODULE 16 : PAIEMENT</text:h>
      <text:h text:style-name="Heading_20_3" text:outline-level="3">Madagascar</text:h>
      <text:list text:style-name="L37">
        <text:list-item>
          <text:p text:style-name="P72">MVola </text:p>
        </text:list-item>
        <text:list-item>
          <text:p text:style-name="P72">Orange Money </text:p>
        </text:list-item>
        <text:list-item>
          <text:p text:style-name="P73">Airtel Money </text:p>
        </text:list-item>
      </text:list>
      <text:h text:style-name="Heading_20_3" text:outline-level="3">International</text:h>
      <text:list text:style-name="L38">
        <text:list-item>
          <text:p text:style-name="P74">Visa </text:p>
        </text:list-item>
        <text:list-item>
          <text:p text:style-name="P74">Mastercard </text:p>
        </text:list-item>
        <text:list-item>
          <text:p text:style-name="P75">PayPal </text:p>
        </text:list-item>
      </text:list>
      <text:p text:style-name="Horizontal_20_Line"/>
      <text:h text:style-name="Heading_20_1" text:outline-level="1">MODULE 17 : CARTOGRAPHIE</text:h>
      <text:p text:style-name="Text_20_body">Carte interactive :</text:p>
      <text:list text:style-name="L39">
        <text:list-item>
          <text:p text:style-name="P76">Guides à proximité </text:p>
        </text:list-item>
        <text:list-item>
          <text:p text:style-name="P76">Agences </text:p>
        </text:list-item>
        <text:list-item>
          <text:p text:style-name="P76">Hôtels </text:p>
        </text:list-item>
        <text:list-item>
          <text:p text:style-name="P76">Sites touristiques </text:p>
        </text:list-item>
        <text:list-item>
          <text:p text:style-name="P77">Restaurants </text:p>
        </text:list-item>
      </text:list>
      <text:p text:style-name="Text_20_body">Technologies :</text:p>
      <text:list text:style-name="L40">
        <text:list-item>
          <text:p text:style-name="P78">OpenStreetMap </text:p>
        </text:list-item>
        <text:list-item>
          <text:p text:style-name="P79">Mapbox </text:p>
        </text:list-item>
      </text:list>
      <text:p text:style-name="Horizontal_20_Line"/>
      <text:h text:style-name="Heading_20_1" text:outline-level="1">MODULE 18 : ANALYSE IA</text:h>
      <text:p text:style-name="Text_20_body">L'IA fournit :</text:p>
      <text:list text:style-name="L41">
        <text:list-item>
          <text:p text:style-name="P80">Prévisions touristiques </text:p>
        </text:list-item>
        <text:list-item>
          <text:p text:style-name="P80">Tendances de voyage </text:p>
        </text:list-item>
        <text:list-item>
          <text:p text:style-name="P80">Recommandations personnalisées </text:p>
        </text:list-item>
        <text:list-item>
          <text:p text:style-name="P81">Suggestions de prix pour les guides et agences </text:p>
        </text:list-item>
      </text:list>
      <text:p text:style-name="Horizontal_20_Line"/>
      <text:h text:style-name="Heading_20_1" text:outline-level="1">6. ARCHITECTURE TECHNIQUE</text:h>
      <text:h text:style-name="Heading_20_3" text:outline-level="3">Mobile</text:h>
      <text:list text:style-name="L42">
        <text:list-item>
          <text:p text:style-name="P82">React Native </text:p>
        </text:list-item>
        <text:list-item>
          <text:p text:style-name="P83">Expo </text:p>
        </text:list-item>
      </text:list>
      <text:h text:style-name="Heading_20_3" text:outline-level="3"><text:soft-page-break/>Web</text:h>
      <text:list text:style-name="L43">
        <text:list-item>
          <text:p text:style-name="P84">Next.js </text:p>
        </text:list-item>
      </text:list>
      <text:h text:style-name="Heading_20_3" text:outline-level="3">Backend</text:h>
      <text:list text:style-name="L44">
        <text:list-item>
          <text:p text:style-name="P85">NestJS // <text:span text:style-name="T1">PYTHON</text:span> </text:p>
        </text:list-item>
      </text:list>
      <text:h text:style-name="Heading_20_3" text:outline-level="3">Base de données</text:h>
      <text:list text:style-name="L45">
        <text:list-item>
          <text:p text:style-name="P86">PostgreSQL </text:p>
        </text:list-item>
      </text:list>
      <text:h text:style-name="Heading_20_3" text:outline-level="3">Cache</text:h>
      <text:list text:style-name="L46">
        <text:list-item>
          <text:p text:style-name="P87">Redis </text:p>
        </text:list-item>
      </text:list>
      <text:h text:style-name="Heading_20_3" text:outline-level="3">Temps réel</text:h>
      <text:list text:style-name="L47">
        <text:list-item>
          <text:p text:style-name="P88">Socket.io </text:p>
        </text:list-item>
      </text:list>
      <text:h text:style-name="Heading_20_3" text:outline-level="3">IA</text:h>
      <text:list text:style-name="L48">
        <text:list-item>
          <text:p text:style-name="P89">OpenAI </text:p>
        </text:list-item>
        <text:list-item>
          <text:p text:style-name="P90">Gemini </text:p>
        </text:list-item>
      </text:list>
      <text:h text:style-name="Heading_20_3" text:outline-level="3">Stockage</text:h>
      <text:list text:style-name="L49">
        <text:list-item>
          <text:p text:style-name="P91">Cloudinary </text:p>
        </text:list-item>
      </text:list>
      <text:h text:style-name="Heading_20_3" text:outline-level="3">Cartographie</text:h>
      <text:list text:style-name="L50">
        <text:list-item>
          <text:p text:style-name="P92"><text:span text:style-name="T1">leeftel</text:span> </text:p>
        </text:list-item>
      </text:list>
      <text:p text:style-name="Horizontal_20_Line"/>
      <text:h text:style-name="Heading_20_1" text:outline-level="1">7. MODÈLE ÉCONOMIQUE</text:h>
      <text:h text:style-name="Heading_20_3" text:outline-level="3">Commissions</text:h>
      <text:list text:style-name="L51">
        <text:list-item>
          <text:p text:style-name="P93">Réservation guide : 10 % </text:p>
        </text:list-item>
        <text:list-item>
          <text:p text:style-name="P94">Réservation agence : 8 % </text:p>
        </text:list-item>
      </text:list>
      <text:h text:style-name="Heading_20_3" text:outline-level="3">Abonnements Premium</text:h>
      <text:p text:style-name="Text_20_body">Guide Premium :</text:p>
      <text:list text:style-name="L52">
        <text:list-item>
          <text:p text:style-name="P95">Mise en avant </text:p>
        </text:list-item>
        <text:list-item>
          <text:p text:style-name="P96">Statistiques avancées </text:p>
        </text:list-item>
      </text:list>
      <text:p text:style-name="Text_20_body">Agence Premium :</text:p>
      <text:list text:style-name="L53">
        <text:list-item>
          <text:p text:style-name="P97">Publicités </text:p>
        </text:list-item>
        <text:list-item>
          <text:p text:style-name="P98">Tableau de bord avancé </text:p>
        </text:list-item>
      </text:list>
      <text:h text:style-name="Heading_20_3" text:outline-level="3"><text:soft-page-break/>Publicités Touristiques</text:h>
      <text:list text:style-name="L54">
        <text:list-item>
          <text:p text:style-name="P99">Hôtels </text:p>
        </text:list-item>
        <text:list-item>
          <text:p text:style-name="P99">Restaurants </text:p>
        </text:list-item>
        <text:list-item>
          <text:p text:style-name="P100">Compagnies aériennes </text:p>
        </text:list-item>
      </text:list>
      <text:p text:style-name="Horizontal_20_Line"/>
      <text:h text:style-name="Heading_20_1" text:outline-level="1">8. MVP (VERSION 1)</text:h>
      <text:p text:style-name="Text_20_body">Fonctionnalités de lancement :</text:p>
      <text:p text:style-name="Text_20_body">✅ Comptes touristes</text:p>
      <text:p text:style-name="Text_20_body">✅ Comptes guides</text:p>
      <text:p text:style-name="Text_20_body">✅ Comptes agences</text:p>
      <text:p text:style-name="Text_20_body">✅ Réservation</text:p>
      <text:p text:style-name="Text_20_body">✅ Paiement Mobile Money</text:p>
      <text:p text:style-name="Text_20_body">✅ IA de planification</text:p>
      <text:p text:style-name="Text_20_body">✅ Avis</text:p>
      <text:p text:style-name="Text_20_body">✅ QR Code</text:p>
      <text:p text:style-name="Text_20_body">✅ Carte interactive</text:p>
      <text:p text:style-name="Horizontal_20_Line"/>
      <text:h text:style-name="Heading_20_1" text:outline-level="1">9. VISION À 5 ANS</text:h>
      <text:p text:style-name="Text_20_body">Faire de <text:span text:style-name="Strong_20_Emphasis">Mikalo Tour</text:span> la première super-plateforme touristique de Madagascar puis d'Afrique, en réunissant voyageurs, guides, agences, hébergements et services locaux dans un écosystème unique alimenté par l'IA. Cette vision est comparable à ce que Airbnb a réalisé pour l'hébergement et ce que Tripadvisor a réalisé pour les avis de voyageurs, mais avec une forte spécialisation sur les guides et agences touristiques africain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4T10:13:46.941093125</meta:creation-date>
    <dc:date>2026-06-14T10:23:57.895256125</dc:date>
    <meta:editing-duration>PT10M13S</meta:editing-duration>
    <meta:editing-cycles>1</meta:editing-cycles>
    <meta:document-statistic meta:table-count="0" meta:image-count="0" meta:object-count="0" meta:page-count="11" meta:paragraph-count="294" meta:word-count="1047" meta:character-count="6195" meta:non-whitespace-character-count="5442"/>
    <meta:generator>LibreOffice/25.8.7.3$Linux_X86_64 LibreOffice_project/580$Build-3</meta:generator>
  </office:meta>
</office:document-meta>
</file>